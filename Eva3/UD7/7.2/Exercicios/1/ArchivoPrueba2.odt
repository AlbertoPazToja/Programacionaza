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aaf" officeooo:paragraph-rsid="00199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xseve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09:04:39.980315000</meta:creation-date>
    <dc:date>2026-05-13T09:04:44.7437281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5.2.4.3$Windows_X86_64 LibreOffice_project/33e196637044ead23f5c3226cde09b47731f7e27</meta:generator>
  </office:meta>
</office:document-meta>
</file>