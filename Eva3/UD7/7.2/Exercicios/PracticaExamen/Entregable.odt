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remos crear dúas clases que teñen elementos en común:<text:line-break/><text:line-break/>1. Crear unha interface chamada Entregable cos métodos:<text:line-break/>- entregar()<text:line-break/>- devolver()<text:line-break/>- isEntregado()<text:line-break/>- compareTo(Object a)<text:line-break/><text:line-break/>2. Crear a clase Serie:<text:line-break/><text:line-break/>Atributos:<text:line-break/>- titulo<text:line-break/>- numeroTempadas (por defecto 3)<text:line-break/>- prestado (por defecto false)<text:line-break/>- xenero<text:line-break/>- creador<text:line-break/><text:line-break/>Métodos:<text:line-break/>- construtor por defecto<text:line-break/>- getters e setters (excepto de prestado)<text:line-break/>- toString()<text:line-break/>- entregar()<text:line-break/>- devolver()<text:line-break/>- isEntregado()<text:line-break/>- compareTo() → compara o número de tempadas<text:line-break/><text:line-break/>3. Crear a clase Videoxogo:<text:line-break/><text:line-break/>Atributos:<text:line-break/>- titulo<text:line-break/>- horasEstimadas (por defecto 10)<text:line-break/>- prestado (por defecto false)<text:line-break/>- xenero<text:line-break/>- compania<text:line-break/><text:line-break/>Métodos:<text:line-break/>- construtor por defecto<text:line-break/>- getters e setters (excepto de prestado)<text:line-break/>- toString()<text:line-break/>- entregar()<text:line-break/>- devolver()<text:line-break/>- isEntregado()<text:line-break/>- compareTo() → compara as horas estimadas<text:line-break/><text:line-break/>4. Crear o programa principal:<text:line-break/><text:line-break/>- Crear un array de Series de 5 posicións<text:line-break/>- Crear un array de Videoxogos de 5 posicións<text:line-break/>- Crear obxectos nas posicións dos arrays<text:line-break/>- Entregar algunhas series e videoxogos<text:line-break/>- Contar cantos están entregados e devolvelos<text:line-break/>- Mostrar:<text:line-break/><text:soft-page-break/>- a serie con máis tempadas<text:line-break/>- o videoxogo con máis horas estimadas<text:line-break/>- toda a información usando toString(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0:55:00.188756200</meta:creation-date>
    <dc:date>2026-05-18T10:55:42.299097400</dc:date>
    <meta:editing-duration>PT42S</meta:editing-duration>
    <meta:editing-cycles>1</meta:editing-cycles>
    <meta:document-statistic meta:table-count="0" meta:image-count="0" meta:object-count="0" meta:page-count="2" meta:paragraph-count="1" meta:word-count="189" meta:character-count="1160" meta:non-whitespace-character-count="962"/>
    <meta:generator>LibreOffice/25.2.4.3$Windows_X86_64 LibreOffice_project/33e196637044ead23f5c3226cde09b47731f7e27</meta:generator>
  </office:meta>
</office:document-meta>
</file>